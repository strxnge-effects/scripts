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tle</text:h>
      <text:p text:style-name="Text_20_body"/>
      <text:p text:style-name="Text_20_body">body paragraph</text:p>
      <text:p text:style-name="Text_20_body"/>
      <text:p text:style-name="Text_20_body">paragraph 2</text:p>
      <text:p text:style-name="Text_20_body"/>
      <text:p text:style-name="Text_20_body">lorem ipsu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style-name="Regular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loext:hyphenation-keep-line="false" style:page-number="auto"/>
      <style:text-properties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3:27:45.813510500</meta:creation-date>
    <dc:title>times new roman</dc:title>
    <meta:editing-cycles>2</meta:editing-cycles>
    <meta:generator>LibreOffice/25.8.5.2$Windows_X86_64 LibreOffice_project/9c8b85f387cc00a89945a79c9e6239f32e450ac2</meta:generator>
    <meta:editing-duration>PT23S</meta:editing-duration>
    <dc:date>2026-05-04T13:28:08.086684700</dc:date>
    <meta:document-statistic meta:table-count="0" meta:image-count="0" meta:object-count="0" meta:page-count="1" meta:paragraph-count="4" meta:word-count="7" meta:character-count="41" meta:non-whitespace-character-count="38"/>
    <meta:template xlink:type="simple" xlink:actuate="onRequest" xlink:title="times new roman" xlink:href="../../../../../AppData/Roaming/LibreOffice/4/user/template/times%20new%20roman.ott" meta:date="2026-05-04T13:27:44.895485600"/>
  </office:meta>
</office:document-meta>
</file>